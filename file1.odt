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b15" officeooo:paragraph-rsid="00055b15"/>
    </style:style>
    <style:style style:name="T1" style:family="text">
      <style:text-properties officeooo:rsid="00031cd5"/>
    </style:style>
    <style:style style:name="T2" style:family="text">
      <style:text-properties officeooo:rsid="00044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3:40:19.906810278</meta:creation-date>
    <dc:date>2021-04-18T15:14:18.214718377</dc:date>
    <meta:editing-duration>PT41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