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b15" officeooo:paragraph-rsid="00055b15"/>
    </style:style>
    <style:style style:name="T1" style:family="text">
      <style:text-properties officeooo:rsid="00057971"/>
    </style:style>
    <style:style style:name="T2" style:family="text">
      <style:text-properties officeooo:rsid="00063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<text:span text:style-name="T1">learning. </text:span><text:span text:style-name="T2">Advanc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19.906810278</meta:creation-date>
    <dc:date>2021-04-19T09:43:30.909855046</dc:date>
    <meta:editing-duration>PT1M12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1" meta:paragraph-count="1" meta:word-count="4" meta:character-count="26" meta:non-whitespace-character-count="23"/>
  </office:meta>
</office:document-meta>
</file>